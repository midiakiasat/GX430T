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987654321" calcext:value-type="float">
            <text:p>987654321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1357924680" calcext:value-type="float">
            <text:p>1357924680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2468013579" calcext:value-type="float">
            <text:p>2468013579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1029384756" calcext:value-type="float">
            <text:p>1029384756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1928374650" calcext:value-type="float">
            <text:p>1928374650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3141592678" calcext:value-type="float">
            <text:p>3141592678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9876543210" calcext:value-type="float">
            <text:p>9876543210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1203984765" calcext:value-type="float">
            <text:p>1203984765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float" office:value="5678901234" calcext:value-type="float">
            <text:p>5678901234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float" office:value="7418529630" calcext:value-type="float">
            <text:p>7418529630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9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Dev/6.0.5.2$Linux_X86_64 LibreOffice_project/</meta:generator>
  </office:meta>
</office:document-meta>
</file>